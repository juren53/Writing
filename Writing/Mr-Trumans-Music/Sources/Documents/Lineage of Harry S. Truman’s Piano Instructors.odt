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194b9f" officeooo:paragraph-rsid="00194b9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194b9f" officeooo:paragraph-rsid="00194b9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bold" officeooo:rsid="00194b9f" officeooo:paragraph-rsid="00194b9f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Montserrat" fo:font-size="30pt" fo:letter-spacing="normal" fo:font-style="normal" fo:font-weight="normal" officeooo:rsid="00194b9f" officeooo:paragraph-rsid="00194b9f" style:font-size-asian="15.75pt" style:font-weight-asian="bold" style:font-size-complex="18pt" style:font-weight-complex="bold"/>
    </style:style>
    <style:style style:name="T1" style:family="text">
      <style:text-properties style:font-name="Arial" fo:font-size="18pt" fo:font-weight="bold" officeooo:rsid="00194b9f" style:font-size-asian="15.75pt" style:font-weight-asian="bold" style:font-size-complex="18pt" style:font-weight-complex="bold"/>
    </style:style>
    <style:style style:name="T2" style:family="text">
      <style:text-properties officeooo:rsid="001b7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eage of <text:span text:style-name="T2">Piano</text:span> Instructors</text:p>
      <text:p text:style-name="P1"/>
      <text:p text:style-name="P1"/>
      <text:p text:style-name="P1"/>
      <text:p text:style-name="P1"/>
      <text:p text:style-name="P2">Harry S. Truman</text:p>
      <text:p text:style-name="P2">|</text:p>
      <text:p text:style-name="P2"><text:s text:c="24"/>| <text:s text:c="23"/></text:p>
      <text:p text:style-name="P2">|</text:p>
      <text:p text:style-name="P2">|</text:p>
      <text:p text:style-name="P2">Grace White</text:p>
      <text:p text:style-name="P3">[ Mrs. E. C. White ]</text:p>
      <text:p text:style-name="P2">|</text:p>
      <text:p text:style-name="P2"><text:s text:c="24"/>| <text:s text:c="23"/></text:p>
      <text:p text:style-name="P2">|</text:p>
      <text:p text:style-name="P2">|</text:p>
      <text:p text:style-name="P2">Theodor Leschetizky</text:p>
      <text:p text:style-name="P2">|</text:p>
      <text:p text:style-name="P2"><text:s text:c="24"/>| <text:s text:c="23"/></text:p>
      <text:p text:style-name="P2">|</text:p>
      <text:p text:style-name="P2">|</text:p>
      <text:p text:style-name="P2">Carl Czerny</text:p>
      <text:p text:style-name="P2">|</text:p>
      <text:p text:style-name="P2"><text:s text:c="24"/>| <text:s text:c="23"/></text:p>
      <text:p text:style-name="P2">|</text:p>
      <text:p text:style-name="P2">|</text:p>
      <text:p text:style-name="P2">Beethoven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9:43:30.042954977</meta:creation-date>
    <dc:date>2018-07-04T19:56:18.721292204</dc:date>
    <meta:editing-duration>PT2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36" meta:character-count="321" meta:non-whitespace-character-count="116"/>
  </office:meta>
</office:document-meta>
</file>